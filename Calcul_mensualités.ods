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04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9.5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rix du bien</text:p>
          </table:table-cell>
          <table:table-cell office:value-type="float" office:value="340000" calcext:value-type="float">
            <text:p>340000</text:p>
          </table:table-cell>
          <table:table-cell office:value-type="string" calcext:value-type="string">
            <text:p>A remplir</text:p>
          </table:table-cell>
          <table:table-cell/>
          <table:table-cell office:value-type="string" calcext:value-type="string">
            <text:p>Salaire mensuel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A remplir</text:p>
          </table:table-cell>
        </table:table-row>
        <table:table-row table:style-name="ro1">
          <table:table-cell office:value-type="string" calcext:value-type="string">
            <text:p>Frais de notaires</text:p>
          </table:table-cell>
          <table:table-cell table:formula="of:=0.08*[.B1]" office:value-type="float" office:value="27200" calcext:value-type="float">
            <text:p>27200</text:p>
          </table:table-cell>
          <table:table-cell table:number-columns-repeated="2"/>
          <table:table-cell office:value-type="string" calcext:value-type="string">
            <text:p>Taux d’endettement</text:p>
          </table:table-cell>
          <table:table-cell table:formula="of:=[.B9]/[.F1]" office:value-type="float" office:value="0.348620793225681" calcext:value-type="float">
            <text:p>0,348620793225681</text:p>
          </table:table-cell>
          <table:table-cell office:value-type="string" calcext:value-type="string">
            <text:p>Ne doit pas dépasser 0,35</text:p>
          </table:table-cell>
        </table:table-row>
        <table:table-row table:style-name="ro1">
          <table:table-cell office:value-type="string" calcext:value-type="string">
            <text:p>Total du projet</text:p>
          </table:table-cell>
          <table:table-cell table:formula="of:=[.B1]+[.B2]" office:value-type="float" office:value="367200" calcext:value-type="float">
            <text:p>367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port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A remplir</text:p>
          </table:table-cell>
          <table:table-cell/>
          <table:table-cell office:value-type="string" calcext:value-type="string">
            <text:p>Charges (elec + eau + wifi + assurance habitation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 remplir</text:p>
          </table:table-cell>
        </table:table-row>
        <table:table-row table:style-name="ro1">
          <table:table-cell office:value-type="string" calcext:value-type="string">
            <text:p>Montant du prêt</text:p>
          </table:table-cell>
          <table:table-cell table:formula="of:=[.B3]-[.B4]" office:value-type="float" office:value="287200" calcext:value-type="float">
            <text:p>287200</text:p>
          </table:table-cell>
          <table:table-cell table:number-columns-repeated="2"/>
          <table:table-cell office:value-type="string" calcext:value-type="string">
            <text:p>Taxe foncière par a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remplir</text:p>
          </table:table-cell>
        </table:table-row>
        <table:table-row table:style-name="ro1">
          <table:table-cell office:value-type="string" calcext:value-type="string">
            <text:p>Taux Annuel</text:p>
          </table:table-cell>
          <table:table-cell office:value-type="float" office:value="0.035" calcext:value-type="float">
            <text:p>0,035</text:p>
          </table:table-cell>
          <table:table-cell office:value-type="string" calcext:value-type="string">
            <text:p>A remplir</text:p>
          </table:table-cell>
          <table:table-cell/>
          <table:table-cell office:value-type="string" calcext:value-type="string">
            <text:p>Reste à Vivre</text:p>
          </table:table-cell>
          <table:table-cell table:formula="of:=[.F1]-[.B9]-[.F4]-[.F5]" office:value-type="float" office:value="1920.65474777471" calcext:value-type="float">
            <text:p>1920,65474777471</text:p>
          </table:table-cell>
          <table:table-cell/>
        </table:table-row>
        <table:table-row table:style-name="ro1">
          <table:table-cell office:value-type="string" calcext:value-type="string">
            <text:p>Taux mensuel</text:p>
          </table:table-cell>
          <table:table-cell table:formula="of:=((1+[.B6])^(1/12))-1" office:value-type="float" office:value="0.00287089871907664" calcext:value-type="float">
            <text:p>0,00287089871907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s du prêt en anné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rempl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sualités</text:p>
          </table:table-cell>
          <table:table-cell table:formula="of:=[.B5]*([.B7]*((1+[.B7])^(12*[.B8])))/(((1+[.B7])^(12*[.B8]))-1)" office:value-type="float" office:value="1429.34525222529" calcext:value-type="float">
            <text:p>1429,3452522252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tant total remboursé</text:p>
          </table:table-cell>
          <table:table-cell table:formula="of:=[.B9]*12*[.B8]" office:value-type="float" office:value="428803.575667588" calcext:value-type="float">
            <text:p>428803,5756675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x total du prêt</text:p>
          </table:table-cell>
          <table:table-cell table:formula="of:=[.B11]-[.B1]" office:value-type="float" office:value="88803.575667588" calcext:value-type="float">
            <text:p>88803,57566758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vestissement par mois</text:p>
          </table:table-cell>
          <table:table-cell table:formula="of:=[.B9]-[.B15]" office:value-type="float" office:value="1133.33333333333" calcext:value-type="float">
            <text:p>1133,33333333333</text:p>
          </table:table-cell>
          <table:table-cell office:value-type="string" calcext:value-type="string">
            <text:p>Ce que tu et de coté dans la pier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x du prêt par mois</text:p>
          </table:table-cell>
          <table:table-cell table:formula="of:=[.B12]/(12*[.B8])" office:value-type="float" office:value="296.01191889196" calcext:value-type="float">
            <text:p>296,01191889196</text:p>
          </table:table-cell>
          <table:table-cell office:value-type="string" calcext:value-type="string">
            <text:p>Ce que tu donnes à la banque (Ton nouveau proprio ;D 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7T19:04:54.884907100</meta:creation-date>
    <dc:date>2026-07-17T19:31:57.621857000</dc:date>
    <meta:editing-duration>PT4M47S</meta:editing-duration>
    <meta:editing-cycles>2</meta:editing-cycles>
    <meta:generator>LibreOffice/25.2.7.2$Windows_X86_64 LibreOffice_project/5cbfd1ab6520636bb5f7b99185aa69bd7456825d</meta:generator>
    <meta:document-statistic meta:table-count="1" meta:cell-count="46" meta:object-count="0"/>
  </office:meta>
</office:document-meta>
</file>